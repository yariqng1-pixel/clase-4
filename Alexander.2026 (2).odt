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lexander Lagu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GUA PALATE CHRISTIAN ALEXANDER</meta:initial-creator>
    <dc:creator>LAGUA PALATE CHRISTIAN ALEXANDER</dc:creator>
    <meta:creation-date>2026-07-13T14:08:00Z</meta:creation-date>
    <dc:date>2026-07-13T14:08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5" meta:row-count="1" meta:non-whitespace-character-count="14"/>
  </office:meta>
</office:document-meta>
</file>